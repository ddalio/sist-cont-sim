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l" table:style-name="ta1">
        <table:shapes>
          <draw:frame draw:z-index="0" draw:style-name="gr1" draw:text-style-name="P1" svg:width="13.5453in" svg:height="8.265in" svg:x="2.7142in" svg:y="1.0823in">
            <draw:object draw:notify-on-update-of-ranges="lineal.A1:lineal.A1 lineal.A2:lineal.A51 lineal.B1:lineal.B1 lineal.B2:lineal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6913in" svg:height="8.2909in" svg:x="17.0476in" svg:y="1.0827in">
            <draw:object draw:notify-on-update-of-ranges="lineal.B1:lineal.B1 lineal.B2:lineal.B51 lineal.C1:lineal.C1 lineal.C2:lineal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posicion</text:p>
          </table:table-cell>
          <table:table-cell office:value-type="string" calcext:value-type="string">
            <text:p>veloc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1.2987" calcext:value-type="float">
            <text:p>-1.2987</text:p>
          </table:table-cell>
        </table:table-row>
        <table:table-row table:style-name="ro1">
          <table:table-cell office:value-type="float" office:value="3.001" calcext:value-type="float">
            <text:p>3.001</text:p>
          </table:table-cell>
          <table:table-cell office:value-type="float" office:value="0.3461" calcext:value-type="float">
            <text:p>0.3461</text:p>
          </table:table-cell>
          <table:table-cell office:value-type="float" office:value="-1.6181" calcext:value-type="float">
            <text:p>-1.6181</text:p>
          </table:table-cell>
        </table:table-row>
        <table:table-row table:style-name="ro1">
          <table:table-cell office:value-type="float" office:value="4.001" calcext:value-type="float">
            <text:p>4.001</text:p>
          </table:table-cell>
          <table:table-cell office:value-type="float" office:value="0.1953" calcext:value-type="float">
            <text:p>0.1953</text:p>
          </table:table-cell>
          <table:table-cell office:value-type="float" office:value="1.4238" calcext:value-type="float">
            <text:p>1.4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1.0562" calcext:value-type="float">
            <text:p>-1.0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883" calcext:value-type="float">
            <text:p>-0.0883</text:p>
          </table:table-cell>
          <table:table-cell office:value-type="float" office:value="-0.3102" calcext:value-type="float">
            <text:p>-0.3102</text:p>
          </table:table-cell>
        </table:table-row>
        <table:table-row table:style-name="ro1">
          <table:table-cell office:value-type="float" office:value="10.001" calcext:value-type="float">
            <text:p>10.001</text:p>
          </table:table-cell>
          <table:table-cell office:value-type="float" office:value="0.0734" calcext:value-type="float">
            <text:p>0.0734</text:p>
          </table:table-cell>
          <table:table-cell office:value-type="float" office:value="-0.2567" calcext:value-type="float">
            <text:p>-0.2567</text:p>
          </table:table-cell>
        </table:table-row>
        <table:table-row table:style-name="ro1">
          <table:table-cell office:value-type="float" office:value="11.001" calcext:value-type="float">
            <text:p>11.001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2892" calcext:value-type="float">
            <text:p>0.2892</text:p>
          </table:table-cell>
        </table:table-row>
        <table:table-row table:style-name="ro1">
          <table:table-cell office:value-type="float" office:value="12.001" calcext:value-type="float">
            <text:p>12.001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3.001" calcext:value-type="float">
            <text:p>13.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1973" calcext:value-type="float">
            <text:p>-0.1973</text:p>
          </table:table-cell>
        </table:table-row>
        <table:table-row table:style-name="ro1">
          <table:table-cell office:value-type="float" office:value="14.001" calcext:value-type="float">
            <text:p>14.00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5.001" calcext:value-type="float">
            <text:p>15.001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float" office:value="16.001" calcext:value-type="float">
            <text:p>16.001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685" calcext:value-type="float">
            <text:p>-0.0685</text:p>
          </table:table-cell>
        </table:table-row>
        <table:table-row table:style-name="ro1">
          <table:table-cell office:value-type="float" office:value="17.001" calcext:value-type="float">
            <text:p>17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84" calcext:value-type="float">
            <text:p>-0.0384</text:p>
          </table:table-cell>
        </table:table-row>
        <table:table-row table:style-name="ro1">
          <table:table-cell office:value-type="float" office:value="18.001" calcext:value-type="float">
            <text:p>18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46" calcext:value-type="float">
            <text:p>-0.01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64" calcext:value-type="float">
            <text:p>-0.0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" calcext:value-type="float">
            <text:p>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" calcext:value-type="float">
            <text:p>0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001" calcext:value-type="float">
            <text:p>39.001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40.001" calcext:value-type="float">
            <text:p>40.001</text:p>
          </table:table-cell>
          <table:table-cell table:number-columns-repeated="2"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41.001" calcext:value-type="float">
            <text:p>41.001</text:p>
          </table:table-cell>
          <table:table-cell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float" office:value="42.001" calcext:value-type="float">
            <text:p>42.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43.001" calcext:value-type="float">
            <text:p>43.00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44.001" calcext:value-type="float">
            <text:p>44.001</text:p>
          </table:table-cell>
          <table:table-cell office:value-type="float" office:value="-0" calcext:value-type="float">
            <text:p>0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45.001" calcext:value-type="float">
            <text:p>45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01" calcext:value-type="float">
            <text:p>46.00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47.001" calcext:value-type="float">
            <text:p>47.0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.001" calcext:value-type="float">
            <text:p>48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001" calcext:value-type="float">
            <text:p>49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001" calcext:value-type="float">
            <text:p>50.001</text:p>
          </table:table-cell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31T12:56:49.815573276</dc:date>
    <meta:editing-duration>PT3M49S</meta:editing-duration>
    <meta:editing-cycles>1</meta:editing-cycles>
    <meta:document-statistic meta:table-count="1" meta:cell-count="153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406cm" svg:height="20.994cm" xlink:href=".." xlink:type="simple" chart:class="chart:scatter" chart:style-name="ch1">
        <chart:title svg:x="14.408cm" svg:y="0.555cm" chart:style-name="ch2">
          <text:p>Evolución Temporal: Lineal</text:p>
        </chart:title>
        <chart:legend chart:legend-position="end" svg:x="31.818cm" svg:y="10.198cm" style:legend-expansion="high" chart:style-name="ch3"/>
        <chart:plot-area chart:style-name="ch4" table:cell-range-address="lineal.A1:lineal.B51" chart:data-source-has-labels="row" svg:x="1.699cm" svg:y="1.753cm" svg:width="29.431cm" svg:height="17.841cm">
          <chart:coordinate-region svg:x="2.532cm" svg:y="1.952cm" svg:width="28.411cm" svg:height="17.443cm"/>
          <chart:axis chart:dimension="x" chart:name="primary-x" chart:style-name="ch5">
            <chart:title svg:x="15.828cm" svg:y="20.013cm" chart:style-name="ch6">
              <text:p>Tiempo</text:p>
            </chart:title>
          </chart:axis>
          <chart:axis chart:dimension="y" chart:name="primary-y" chart:style-name="ch7">
            <chart:title svg:x="0.451cm" svg:y="11.365cm" chart:style-name="ch8">
              <text:p>Poisición</text:p>
            </chart:title>
            <chart:grid chart:style-name="ch9" chart:class="major"/>
          </chart:axis>
          <chart:series chart:style-name="ch10" chart:values-cell-range-address="lineal.B2:lineal.B51" chart:label-cell-address="lineal.B1:lineal.B1" chart:class="chart:scatter">
            <chart:domain table:cell-range-address="lineal.A2:lineal.A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cion</text:p>
                <draw:g>
                  <svg:desc>lineal.B1:line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l.A2:lineal.A51</svg:desc>
                </draw:g>
              </table:table-cell>
              <table:table-cell office:value-type="float" office:value="-0.2344">
                <text:p>-0.2344</text:p>
                <draw:g>
                  <svg:desc>lineal.B2:lineal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1">
                <text:p>2.001</text:p>
              </table:table-cell>
              <table:table-cell office:value-type="float" office:value="-0.5302">
                <text:p>-0.5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01">
                <text:p>3.001</text:p>
              </table:table-cell>
              <table:table-cell office:value-type="float" office:value="0.3461">
                <text:p>0.3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01">
                <text:p>4.001</text:p>
              </table:table-cell>
              <table:table-cell office:value-type="float" office:value="0.1953">
                <text:p>0.1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2895">
                <text:p>-0.2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826">
                <text:p>0.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0883">
                <text:p>-0.0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01">
                <text:p>10.001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01">
                <text:p>11.001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01">
                <text:p>12.001</text:p>
              </table:table-cell>
              <table:table-cell office:value-type="float" office:value="-0.0557">
                <text:p>-0.0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01">
                <text:p>13.00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01">
                <text:p>14.001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01">
                <text:p>15.001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001">
                <text:p>16.001</text:p>
              </table:table-cell>
              <table:table-cell office:value-type="float" office:value="-0.0142">
                <text:p>-0.0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001">
                <text:p>17.00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01">
                <text:p>18.0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001">
                <text:p>39.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001">
                <text:p>40.001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01">
                <text:p>41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.001">
                <text:p>42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001">
                <text:p>43.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001">
                <text:p>44.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001">
                <text:p>45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001">
                <text:p>46.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001">
                <text:p>47.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001">
                <text:p>48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001">
                <text:p>49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001">
                <text:p>50.001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317cm" svg:height="21.06cm" xlink:href=".." xlink:type="simple" chart:class="chart:scatter" chart:style-name="ch1">
        <chart:title svg:x="15.029cm" svg:y="0.557cm" chart:style-name="ch2">
          <text:p>Diagrama de Fases:  Modelo Lineal</text:p>
        </chart:title>
        <chart:legend chart:legend-position="end" svg:x="34.544cm" svg:y="10.231cm" style:legend-expansion="high" chart:style-name="ch3"/>
        <chart:plot-area chart:style-name="ch4" table:cell-range-address="lineal.B1:lineal.C51" chart:data-source-has-labels="row" svg:x="1.757cm" svg:y="1.757cm" svg:width="32.041cm" svg:height="17.901cm">
          <chart:coordinate-region svg:x="2.048cm" svg:y="1.956cm" svg:width="31.51cm" svg:height="17.503cm"/>
          <chart:axis chart:dimension="x" chart:name="primary-x" chart:style-name="ch5">
            <chart:title svg:x="17.124cm" svg:y="20.079cm" chart:style-name="ch6">
              <text:p>Posición</text:p>
            </chart:title>
          </chart:axis>
          <chart:axis chart:dimension="y" chart:name="primary-y" chart:style-name="ch7">
            <chart:title svg:x="0.451cm" svg:y="11.452cm" chart:style-name="ch8">
              <text:p>Velocidad</text:p>
            </chart:title>
            <chart:grid chart:style-name="ch9" chart:class="major"/>
          </chart:axis>
          <chart:series chart:style-name="ch10" chart:values-cell-range-address="lineal.C2:lineal.C51" chart:label-cell-address="lineal.C1:lineal.C1" chart:class="chart:scatter">
            <chart:domain table:cell-range-address="lineal.B2:lineal.B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elocidad</text:p>
                <draw:g>
                  <svg:desc>lineal.C1:line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344">
                <text:p>-0.2344</text:p>
                <draw:g>
                  <svg:desc>lineal.B2:lineal.B51</svg:desc>
                </draw:g>
              </table:table-cell>
              <table:table-cell office:value-type="float" office:value="3.417">
                <text:p>3.417</text:p>
                <draw:g>
                  <svg:desc>lineal.C2:lineal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302">
                <text:p>-0.5302</text:p>
              </table:table-cell>
              <table:table-cell office:value-type="float" office:value="-1.2987">
                <text:p>-1.2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1">
                <text:p>0.3461</text:p>
              </table:table-cell>
              <table:table-cell office:value-type="float" office:value="-1.6181">
                <text:p>-1.6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53">
                <text:p>0.1953</text:p>
              </table:table-cell>
              <table:table-cell office:value-type="float" office:value="1.4238">
                <text:p>1.4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895">
                <text:p>-0.2895</text:p>
              </table:table-cell>
              <table:table-cell office:value-type="float" office:value="0.4498">
                <text:p>0.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">
                <text:p>-0.009</text:p>
              </table:table-cell>
              <table:table-cell office:value-type="float" office:value="-1.0562">
                <text:p>-1.0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6">
                <text:p>0.1826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44">
                <text:p>-0.0644</text:p>
              </table:table-cell>
              <table:table-cell office:value-type="float" office:value="0.6049">
                <text:p>0.6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83">
                <text:p>-0.0883</text:p>
              </table:table-cell>
              <table:table-cell office:value-type="float" office:value="-0.3102">
                <text:p>-0.3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4">
                <text:p>0.0734</text:p>
              </table:table-cell>
              <table:table-cell office:value-type="float" office:value="-0.2567">
                <text:p>-0.2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6">
                <text:p>0.0266</text:p>
              </table:table-cell>
              <table:table-cell office:value-type="float" office:value="0.2892">
                <text:p>0.2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57">
                <text:p>-0.055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">
                <text:p>0.0048</text:p>
              </table:table-cell>
              <table:table-cell office:value-type="float" office:value="-0.1973">
                <text:p>-0.1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6">
                <text:p>0.032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55">
                <text:p>-0.0155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42">
                <text:p>-0.0142</text:p>
              </table:table-cell>
              <table:table-cell office:value-type="float" office:value="-0.0685">
                <text:p>-0.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">
                <text:p>0.015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">
                <text:p>0.003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5">
                <text:p>-0.01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2">
                <text:p>0.0022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6">
                <text:p>0.0056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5">
                <text:p>-0.0035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1">
                <text:p>-0.0021</text:p>
              </table:table-cell>
              <table:table-cell office:value-type="float" office:value="-0.0146">
                <text:p>-0.0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">
                <text:p>0.003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">
                <text:p>0.000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9">
                <text:p>-0.0019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">
                <text:p>0.0006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">
                <text:p>0.0009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8">
                <text:p>-0.000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3">
                <text:p>-0.0003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">
                <text:p>0.000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3">
                <text:p>-0.0003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">
                <text:p>0.0002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">
                <text:p>0.0002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2">
                <text:p>-0.00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">
                <text:p>-0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">
                <text:p>0.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">
                <text:p>-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">
                <text:p>-0.0001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">
                <text:p>-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">
                <text:p>-0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">
                <text:p>-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