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_lineal" table:style-name="ta1">
        <table:shapes>
          <draw:frame draw:z-index="0" draw:style-name="gr1" draw:text-style-name="P1" svg:width="14.1854in" svg:height="7.976in" svg:x="3.4618in" svg:y="0.3346in">
            <draw:object draw:notify-on-update-of-ranges="no_lineal.A1:no_lineal.A1 no_lineal.A2:no_lineal.A51 no_lineal.B1:no_lineal.B1 no_lineal.B2:no_lineal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37in" svg:height="8.8713in" svg:x="18.6114in" svg:y="0.2138in">
            <draw:object draw:notify-on-update-of-ranges="no_lineal.B1:no_lineal.B1 no_lineal.B2:no_lineal.B51 no_lineal.C1:no_lineal.C1 no_lineal.C2:no_lineal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posicion</text:p>
          </table:table-cell>
          <table:table-cell office:value-type="string" calcext:value-type="string">
            <text:p>veloc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721" calcext:value-type="float">
            <text:p>-0.4721</text:p>
          </table:table-cell>
          <table:table-cell office:value-type="float" office:value="3.9915" calcext:value-type="float">
            <text:p>3.9915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-1.0371" calcext:value-type="float">
            <text:p>-1.0371</text:p>
          </table:table-cell>
          <table:table-cell office:value-type="float" office:value="-0.0901" calcext:value-type="float">
            <text:p>-0.0901</text:p>
          </table:table-cell>
        </table:table-row>
        <table:table-row table:style-name="ro1">
          <table:table-cell office:value-type="float" office:value="3.001" calcext:value-type="float">
            <text:p>3.001</text:p>
          </table:table-cell>
          <table:table-cell office:value-type="float" office:value="-0.4003" calcext:value-type="float">
            <text:p>-0.4003</text:p>
          </table:table-cell>
          <table:table-cell office:value-type="float" office:value="-1.9073" calcext:value-type="float">
            <text:p>-1.9073</text:p>
          </table:table-cell>
        </table:table-row>
        <table:table-row table:style-name="ro1">
          <table:table-cell office:value-type="float" office:value="4.001" calcext:value-type="float">
            <text:p>4.001</text:p>
          </table:table-cell>
          <table:table-cell office:value-type="float" office:value="-0.1722" calcext:value-type="float">
            <text:p>-0.1722</text:p>
          </table:table-cell>
          <table:table-cell office:value-type="float" office:value="0.2469" calcext:value-type="float">
            <text:p>0.2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05" calcext:value-type="float">
            <text:p>-0.5505</text:p>
          </table:table-cell>
          <table:table-cell office:value-type="float" office:value="1.0934" calcext:value-type="float">
            <text:p>1.0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6561" calcext:value-type="float">
            <text:p>-0.6561</text:p>
          </table:table-cell>
          <table:table-cell office:value-type="float" office:value="-0.3264" calcext:value-type="float">
            <text:p>-0.3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4011" calcext:value-type="float">
            <text:p>-0.4011</text:p>
          </table:table-cell>
          <table:table-cell office:value-type="float" office:value="-0.667" calcext:value-type="float">
            <text:p>-0.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658" calcext:value-type="float">
            <text:p>-0.3658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489" calcext:value-type="float">
            <text:p>-0.5489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1">
          <table:table-cell office:value-type="float" office:value="10.001" calcext:value-type="float">
            <text:p>10.001</text:p>
          </table:table-cell>
          <table:table-cell office:value-type="float" office:value="-0.5501" calcext:value-type="float">
            <text:p>-0.5501</text:p>
          </table:table-cell>
          <table:table-cell office:value-type="float" office:value="-0.3009" calcext:value-type="float">
            <text:p>-0.3009</text:p>
          </table:table-cell>
        </table:table-row>
        <table:table-row table:style-name="ro1">
          <table:table-cell office:value-type="float" office:value="11.001" calcext:value-type="float">
            <text:p>11.001</text:p>
          </table:table-cell>
          <table:table-cell office:value-type="float" office:value="-0.4147" calcext:value-type="float">
            <text:p>-0.4147</text:p>
          </table:table-cell>
          <table:table-cell office:value-type="float" office:value="-0.2724" calcext:value-type="float">
            <text:p>-0.2724</text:p>
          </table:table-cell>
        </table:table-row>
        <table:table-row table:style-name="ro1">
          <table:table-cell office:value-type="float" office:value="12.001" calcext:value-type="float">
            <text:p>12.001</text:p>
          </table:table-cell>
          <table:table-cell office:value-type="float" office:value="-0.4336" calcext:value-type="float">
            <text:p>-0.4336</text:p>
          </table:table-cell>
          <table:table-cell office:value-type="float" office:value="0.2708" calcext:value-type="float">
            <text:p>0.2708</text:p>
          </table:table-cell>
        </table:table-row>
        <table:table-row table:style-name="ro1">
          <table:table-cell office:value-type="float" office:value="13.001" calcext:value-type="float">
            <text:p>13.001</text:p>
          </table:table-cell>
          <table:table-cell office:value-type="float" office:value="-0.5356" calcext:value-type="float">
            <text:p>-0.535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4.001" calcext:value-type="float">
            <text:p>14.001</text:p>
          </table:table-cell>
          <table:table-cell office:value-type="float" office:value="-0.5054" calcext:value-type="float">
            <text:p>-0.5054</text:p>
          </table:table-cell>
          <table:table-cell office:value-type="float" office:value="-0.2434" calcext:value-type="float">
            <text:p>-0.2434</text:p>
          </table:table-cell>
        </table:table-row>
        <table:table-row table:style-name="ro1">
          <table:table-cell office:value-type="float" office:value="15.001" calcext:value-type="float">
            <text:p>15.001</text:p>
          </table:table-cell>
          <table:table-cell office:value-type="float" office:value="-0.4289" calcext:value-type="float">
            <text:p>-0.4289</text:p>
          </table:table-cell>
          <table:table-cell office:value-type="float" office:value="-0.0958" calcext:value-type="float">
            <text:p>-0.0958</text:p>
          </table:table-cell>
        </table:table-row>
        <table:table-row table:style-name="ro1">
          <table:table-cell office:value-type="float" office:value="16.001" calcext:value-type="float">
            <text:p>16.001</text:p>
          </table:table-cell>
          <table:table-cell office:value-type="float" office:value="-0.4651" calcext:value-type="float">
            <text:p>-0.4651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7.001" calcext:value-type="float">
            <text:p>17.001</text:p>
          </table:table-cell>
          <table:table-cell office:value-type="float" office:value="-0.5222" calcext:value-type="float">
            <text:p>-0.5222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8.001" calcext:value-type="float">
            <text:p>18.001</text:p>
          </table:table-cell>
          <table:table-cell office:value-type="float" office:value="-0.4832" calcext:value-type="float">
            <text:p>-0.4832</text:p>
          </table:table-cell>
          <table:table-cell office:value-type="float" office:value="-0.1847" calcext:value-type="float">
            <text:p>-0.18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0056" calcext:value-type="float">
            <text:p>-0.00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51" calcext:value-type="float">
            <text:p>-0.51</text:p>
          </table:table-cell>
          <table:table-cell office:value-type="float" office:value="-0.0213" calcext:value-type="float">
            <text:p>-0.0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4716" calcext:value-type="float">
            <text:p>-0.4716</text:p>
          </table:table-cell>
          <table:table-cell office:value-type="float" office:value="-0.1314" calcext:value-type="float">
            <text:p>-0.13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4534" calcext:value-type="float">
            <text:p>-0.453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4895" calcext:value-type="float">
            <text:p>-0.4895</text:p>
          </table:table-cell>
          <table:table-cell office:value-type="float" office:value="0.1077" calcext:value-type="float">
            <text:p>0.10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4996" calcext:value-type="float">
            <text:p>-0.4996</text:p>
          </table:table-cell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662" calcext:value-type="float">
            <text:p>-0.4662</text:p>
          </table:table-cell>
          <table:table-cell office:value-type="float" office:value="-0.0855" calcext:value-type="float">
            <text:p>-0.08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629" calcext:value-type="float">
            <text:p>-0.4629</text:p>
          </table:table-cell>
          <table:table-cell office:value-type="float" office:value="0.0608" calcext:value-type="float">
            <text:p>0.06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4929" calcext:value-type="float">
            <text:p>-0.4929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4909" calcext:value-type="float">
            <text:p>-0.4909</text:p>
          </table:table-cell>
          <table:table-cell office:value-type="float" office:value="-0.0653" calcext:value-type="float">
            <text:p>-0.06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4645" calcext:value-type="float">
            <text:p>-0.4645</text:p>
          </table:table-cell>
          <table:table-cell office:value-type="float" office:value="-0.0474" calcext:value-type="float">
            <text:p>-0.0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4707" calcext:value-type="float">
            <text:p>-0.4707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4934" calcext:value-type="float">
            <text:p>-0.4934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0653" calcext:value-type="float">
            <text:p>-0.06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4651" calcext:value-type="float">
            <text:p>-0.4651</text:p>
          </table:table-cell>
          <table:table-cell office:value-type="float" office:value="-0.0173" calcext:value-type="float">
            <text:p>-0.01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4768" calcext:value-type="float">
            <text:p>-0.4768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492" calcext:value-type="float">
            <text:p>-0.492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4788" calcext:value-type="float">
            <text:p>-0.4788</text:p>
          </table:table-cell>
          <table:table-cell office:value-type="float" office:value="-0.0578" calcext:value-type="float">
            <text:p>-0.05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4671" calcext:value-type="float">
            <text:p>-0.4671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39.001" calcext:value-type="float">
            <text:p>39.001</text:p>
          </table:table-cell>
          <table:table-cell office:value-type="float" office:value="-0.4811" calcext:value-type="float">
            <text:p>-0.4811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float" office:value="40.001" calcext:value-type="float">
            <text:p>40.001</text:p>
          </table:table-cell>
          <table:table-cell office:value-type="float" office:value="-0.4896" calcext:value-type="float">
            <text:p>-0.4896</text:p>
          </table:table-cell>
          <table:table-cell office:value-type="float" office:value="-0.0134" calcext:value-type="float">
            <text:p>-0.0134</text:p>
          </table:table-cell>
        </table:table-row>
        <table:table-row table:style-name="ro1">
          <table:table-cell office:value-type="float" office:value="41.001" calcext:value-type="float">
            <text:p>41.001</text:p>
          </table:table-cell>
          <table:table-cell office:value-type="float" office:value="-0.4752" calcext:value-type="float">
            <text:p>-0.4752</text:p>
          </table:table-cell>
          <table:table-cell office:value-type="float" office:value="-0.0458" calcext:value-type="float">
            <text:p>-0.0458</text:p>
          </table:table-cell>
        </table:table-row>
        <table:table-row table:style-name="ro1">
          <table:table-cell office:value-type="float" office:value="42.001" calcext:value-type="float">
            <text:p>42.001</text:p>
          </table:table-cell>
          <table:table-cell office:value-type="float" office:value="-0.4699" calcext:value-type="float">
            <text:p>-0.4699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43.001" calcext:value-type="float">
            <text:p>43.001</text:p>
          </table:table-cell>
          <table:table-cell office:value-type="float" office:value="-0.4841" calcext:value-type="float">
            <text:p>-0.484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44.001" calcext:value-type="float">
            <text:p>44.001</text:p>
          </table:table-cell>
          <table:table-cell office:value-type="float" office:value="-0.4866" calcext:value-type="float">
            <text:p>-0.4866</text:p>
          </table:table-cell>
          <table:table-cell office:value-type="float" office:value="-0.0254" calcext:value-type="float">
            <text:p>-0.0254</text:p>
          </table:table-cell>
        </table:table-row>
        <table:table-row table:style-name="ro1">
          <table:table-cell office:value-type="float" office:value="45.001" calcext:value-type="float">
            <text:p>45.001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0318" calcext:value-type="float">
            <text:p>-0.0318</text:p>
          </table:table-cell>
        </table:table-row>
        <table:table-row table:style-name="ro1">
          <table:table-cell office:value-type="float" office:value="46.001" calcext:value-type="float">
            <text:p>46.001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47.001" calcext:value-type="float">
            <text:p>47.001</text:p>
          </table:table-cell>
          <table:table-cell office:value-type="float" office:value="-0.4856" calcext:value-type="float">
            <text:p>-0.4856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48.001" calcext:value-type="float">
            <text:p>48.001</text:p>
          </table:table-cell>
          <table:table-cell office:value-type="float" office:value="-0.4835" calcext:value-type="float">
            <text:p>-0.4835</text:p>
          </table:table-cell>
          <table:table-cell office:value-type="float" office:value="-0.0313" calcext:value-type="float">
            <text:p>-0.0313</text:p>
          </table:table-cell>
        </table:table-row>
        <table:table-row table:style-name="ro1">
          <table:table-cell office:value-type="float" office:value="49.001" calcext:value-type="float">
            <text:p>49.001</text:p>
          </table:table-cell>
          <table:table-cell office:value-type="float" office:value="-0.472" calcext:value-type="float">
            <text:p>-0.472</text:p>
          </table:table-cell>
          <table:table-cell office:value-type="float" office:value="-0.0176" calcext:value-type="float">
            <text:p>-0.0176</text:p>
          </table:table-cell>
        </table:table-row>
        <table:table-row table:style-name="ro1">
          <table:table-cell office:value-type="float" office:value="50.001" calcext:value-type="float">
            <text:p>50.001</text:p>
          </table:table-cell>
          <table:table-cell office:value-type="float" office:value="-0.476" calcext:value-type="float">
            <text:p>-0.476</text:p>
          </table:table-cell>
          <table:table-cell office:value-type="float" office:value="0.0323" calcext:value-type="float">
            <text:p>0.0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31T12:52:53.157750368</dc:date>
    <meta:editing-duration>PT2M15S</meta:editing-duration>
    <meta:editing-cycles>1</meta:editing-cycles>
    <meta:document-statistic meta:table-count="1" meta:cell-count="153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032cm" svg:height="20.26cm" xlink:href=".." xlink:type="simple" chart:class="chart:scatter" chart:style-name="ch1">
        <chart:title svg:x="14.083cm" svg:y="0.541cm" chart:style-name="ch2">
          <text:p>Evolución Temporal: Modelo No Lineal</text:p>
        </chart:title>
        <chart:legend chart:legend-position="end" svg:x="29.874cm" svg:y="8.685cm" style:legend-expansion="custom" svg:width="5.354cm" svg:height="1.345cm" style:legend-expansion-aspect-ratio="3.98066914498141" chart:style-name="ch3"/>
        <chart:plot-area chart:style-name="ch4" table:cell-range-address="no_lineal.A1:no_lineal.B51" chart:data-source-has-labels="row" svg:x="1.731cm" svg:y="1.725cm" svg:width="30.993cm" svg:height="17.149cm">
          <chart:coordinate-region svg:x="2.564cm" svg:y="1.924cm" svg:width="29.974cm" svg:height="16.751cm"/>
          <chart:axis chart:dimension="x" chart:name="primary-x" chart:style-name="ch5">
            <chart:title svg:x="16.641cm" svg:y="19.279cm" chart:style-name="ch6">
              <text:p>Tiempo</text:p>
            </chart:title>
          </chart:axis>
          <chart:axis chart:dimension="y" chart:name="primary-y" chart:style-name="ch5">
            <chart:title svg:x="0.451cm" svg:y="10.952cm" chart:style-name="ch7">
              <text:p>Posición</text:p>
            </chart:title>
            <chart:grid chart:style-name="ch8" chart:class="major"/>
          </chart:axis>
          <chart:series chart:style-name="ch9" chart:values-cell-range-address="no_lineal.B2:no_lineal.B51" chart:label-cell-address="no_lineal.B1:no_lineal.B1" chart:class="chart:scatter">
            <chart:domain table:cell-range-address="no_lineal.A2:no_lineal.A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cion</text:p>
                <draw:g>
                  <svg:desc>no_lineal.B1:no_line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o_lineal.A2:no_lineal.A51</svg:desc>
                </draw:g>
              </table:table-cell>
              <table:table-cell office:value-type="float" office:value="-0.4721">
                <text:p>-0.4721</text:p>
                <draw:g>
                  <svg:desc>no_lineal.B2:no_lineal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1">
                <text:p>2.001</text:p>
              </table:table-cell>
              <table:table-cell office:value-type="float" office:value="-1.0371">
                <text:p>-1.0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01">
                <text:p>3.001</text:p>
              </table:table-cell>
              <table:table-cell office:value-type="float" office:value="-0.4003">
                <text:p>-0.4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01">
                <text:p>4.001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5505">
                <text:p>-0.5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6561">
                <text:p>-0.6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4011">
                <text:p>-0.4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3658">
                <text:p>-0.3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5489">
                <text:p>-0.5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01">
                <text:p>10.001</text:p>
              </table:table-cell>
              <table:table-cell office:value-type="float" office:value="-0.5501">
                <text:p>-0.5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01">
                <text:p>11.001</text:p>
              </table:table-cell>
              <table:table-cell office:value-type="float" office:value="-0.4147">
                <text:p>-0.4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01">
                <text:p>12.001</text:p>
              </table:table-cell>
              <table:table-cell office:value-type="float" office:value="-0.4336">
                <text:p>-0.4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01">
                <text:p>13.001</text:p>
              </table:table-cell>
              <table:table-cell office:value-type="float" office:value="-0.5356">
                <text:p>-0.5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01">
                <text:p>14.001</text:p>
              </table:table-cell>
              <table:table-cell office:value-type="float" office:value="-0.5054">
                <text:p>-0.5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01">
                <text:p>15.001</text:p>
              </table:table-cell>
              <table:table-cell office:value-type="float" office:value="-0.4289">
                <text:p>-0.4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001">
                <text:p>16.001</text:p>
              </table:table-cell>
              <table:table-cell office:value-type="float" office:value="-0.4651">
                <text:p>-0.4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001">
                <text:p>17.001</text:p>
              </table:table-cell>
              <table:table-cell office:value-type="float" office:value="-0.5222">
                <text:p>-0.5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001">
                <text:p>18.001</text:p>
              </table:table-cell>
              <table:table-cell office:value-type="float" office:value="-0.4832">
                <text:p>-0.4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442">
                <text:p>-0.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4814">
                <text:p>-0.4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4716">
                <text:p>-0.4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4534">
                <text:p>-0.4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4895">
                <text:p>-0.4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4996">
                <text:p>-0.4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4662">
                <text:p>-0.4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4629">
                <text:p>-0.4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4929">
                <text:p>-0.4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4909">
                <text:p>-0.4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4645">
                <text:p>-0.4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4707">
                <text:p>-0.4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4934">
                <text:p>-0.4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484">
                <text:p>-0.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4651">
                <text:p>-0.4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4768">
                <text:p>-0.4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492">
                <text:p>-0.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4788">
                <text:p>-0.4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4671">
                <text:p>-0.4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001">
                <text:p>39.001</text:p>
              </table:table-cell>
              <table:table-cell office:value-type="float" office:value="-0.4811">
                <text:p>-0.4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001">
                <text:p>40.001</text:p>
              </table:table-cell>
              <table:table-cell office:value-type="float" office:value="-0.4896">
                <text:p>-0.4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001">
                <text:p>41.001</text:p>
              </table:table-cell>
              <table:table-cell office:value-type="float" office:value="-0.4752">
                <text:p>-0.4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.001">
                <text:p>42.001</text:p>
              </table:table-cell>
              <table:table-cell office:value-type="float" office:value="-0.4699">
                <text:p>-0.4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001">
                <text:p>43.001</text:p>
              </table:table-cell>
              <table:table-cell office:value-type="float" office:value="-0.4841">
                <text:p>-0.4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001">
                <text:p>44.001</text:p>
              </table:table-cell>
              <table:table-cell office:value-type="float" office:value="-0.4866">
                <text:p>-0.4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001">
                <text:p>45.001</text:p>
              </table:table-cell>
              <table:table-cell office:value-type="float" office:value="-0.473">
                <text:p>-0.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001">
                <text:p>46.001</text:p>
              </table:table-cell>
              <table:table-cell office:value-type="float" office:value="-0.473">
                <text:p>-0.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001">
                <text:p>47.001</text:p>
              </table:table-cell>
              <table:table-cell office:value-type="float" office:value="-0.4856">
                <text:p>-0.4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001">
                <text:p>48.001</text:p>
              </table:table-cell>
              <table:table-cell office:value-type="float" office:value="-0.4835">
                <text:p>-0.4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001">
                <text:p>49.001</text:p>
              </table:table-cell>
              <table:table-cell office:value-type="float" office:value="-0.472">
                <text:p>-0.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001">
                <text:p>50.001</text:p>
              </table:table-cell>
              <table:table-cell office:value-type="float" office:value="-0.476">
                <text:p>-0.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797cm" svg:height="22.534cm" xlink:href=".." xlink:type="simple" chart:class="chart:scatter" chart:style-name="ch1">
        <chart:title svg:x="10.478cm" svg:y="0.586cm" chart:style-name="ch2">
          <text:p>Diagrama de Fases: Modelo No Lineal</text:p>
        </chart:title>
        <chart:legend chart:legend-position="end" svg:x="26.024cm" svg:y="10.968cm" style:legend-expansion="high" chart:style-name="ch3"/>
        <chart:plot-area chart:style-name="ch4" table:cell-range-address="no_lineal.B1:no_lineal.C51" chart:data-source-has-labels="row" svg:x="3.902cm" svg:y="1.355cm" svg:width="21.06cm" svg:height="19.29cm">
          <chart:coordinate-region svg:x="4.193cm" svg:y="1.554cm" svg:width="20.476cm" svg:height="18.892cm"/>
          <chart:axis chart:dimension="x" chart:name="primary-x" chart:style-name="ch5">
            <chart:title svg:x="13.779cm" svg:y="21.095cm" chart:style-name="ch6">
              <text:p>Posición</text:p>
            </chart:title>
          </chart:axis>
          <chart:axis chart:dimension="y" chart:name="primary-y" chart:style-name="ch7">
            <chart:title svg:x="2.767cm" svg:y="11.745cm" chart:style-name="ch8">
              <text:p>Velocidad</text:p>
            </chart:title>
            <chart:grid chart:style-name="ch9" chart:class="major"/>
          </chart:axis>
          <chart:series chart:style-name="ch10" chart:values-cell-range-address="no_lineal.C2:no_lineal.C51" chart:label-cell-address="no_lineal.C1:no_lineal.C1" chart:class="chart:scatter">
            <chart:domain table:cell-range-address="no_lineal.B2:no_lineal.B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elocidad</text:p>
                <draw:g>
                  <svg:desc>no_lineal.C1:no_linea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721">
                <text:p>-0.4721</text:p>
                <draw:g>
                  <svg:desc>no_lineal.B2:no_lineal.B51</svg:desc>
                </draw:g>
              </table:table-cell>
              <table:table-cell office:value-type="float" office:value="3.9915">
                <text:p>3.9915</text:p>
                <draw:g>
                  <svg:desc>no_lineal.C2:no_lineal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371">
                <text:p>-1.0371</text:p>
              </table:table-cell>
              <table:table-cell office:value-type="float" office:value="-0.0901">
                <text:p>-0.0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003">
                <text:p>-0.4003</text:p>
              </table:table-cell>
              <table:table-cell office:value-type="float" office:value="-1.9073">
                <text:p>-1.9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22">
                <text:p>-0.1722</text:p>
              </table:table-cell>
              <table:table-cell office:value-type="float" office:value="0.2469">
                <text:p>0.2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505">
                <text:p>-0.5505</text:p>
              </table:table-cell>
              <table:table-cell office:value-type="float" office:value="1.0934">
                <text:p>1.0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561">
                <text:p>-0.6561</text:p>
              </table:table-cell>
              <table:table-cell office:value-type="float" office:value="-0.3264">
                <text:p>-0.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011">
                <text:p>-0.4011</text:p>
              </table:table-cell>
              <table:table-cell office:value-type="float" office:value="-0.667">
                <text:p>-0.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658">
                <text:p>-0.3658</text:p>
              </table:table-cell>
              <table:table-cell office:value-type="float" office:value="0.3163">
                <text:p>0.3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489">
                <text:p>-0.5489</text:p>
              </table:table-cell>
              <table:table-cell office:value-type="float" office:value="0.4298">
                <text:p>0.4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01">
                <text:p>-0.5501</text:p>
              </table:table-cell>
              <table:table-cell office:value-type="float" office:value="-0.3009">
                <text:p>-0.3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147">
                <text:p>-0.4147</text:p>
              </table:table-cell>
              <table:table-cell office:value-type="float" office:value="-0.2724">
                <text:p>-0.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336">
                <text:p>-0.4336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356">
                <text:p>-0.535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054">
                <text:p>-0.5054</text:p>
              </table:table-cell>
              <table:table-cell office:value-type="float" office:value="-0.2434">
                <text:p>-0.2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289">
                <text:p>-0.4289</text:p>
              </table:table-cell>
              <table:table-cell office:value-type="float" office:value="-0.0958">
                <text:p>-0.0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651">
                <text:p>-0.465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22">
                <text:p>-0.5222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832">
                <text:p>-0.4832</text:p>
              </table:table-cell>
              <table:table-cell office:value-type="float" office:value="-0.1847">
                <text:p>-0.1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42">
                <text:p>-0.442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814">
                <text:p>-0.4814</text:p>
              </table:table-cell>
              <table:table-cell office:value-type="float" office:value="0.1573">
                <text:p>0.1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1">
                <text:p>-0.51</text:p>
              </table:table-cell>
              <table:table-cell office:value-type="float" office:value="-0.0213">
                <text:p>-0.0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716">
                <text:p>-0.4716</text:p>
              </table:table-cell>
              <table:table-cell office:value-type="float" office:value="-0.1314">
                <text:p>-0.1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34">
                <text:p>-0.453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895">
                <text:p>-0.4895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996">
                <text:p>-0.4996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662">
                <text:p>-0.4662</text:p>
              </table:table-cell>
              <table:table-cell office:value-type="float" office:value="-0.0855">
                <text:p>-0.0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629">
                <text:p>-0.4629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929">
                <text:p>-0.4929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909">
                <text:p>-0.4909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645">
                <text:p>-0.4645</text:p>
              </table:table-cell>
              <table:table-cell office:value-type="float" office:value="-0.0474">
                <text:p>-0.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707">
                <text:p>-0.4707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934">
                <text:p>-0.4934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84">
                <text:p>-0.484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651">
                <text:p>-0.4651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768">
                <text:p>-0.4768</text:p>
              </table:table-cell>
              <table:table-cell office:value-type="float" office:value="0.0623">
                <text:p>0.06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92">
                <text:p>-0.492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788">
                <text:p>-0.4788</text:p>
              </table:table-cell>
              <table:table-cell office:value-type="float" office:value="-0.0578">
                <text:p>-0.0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71">
                <text:p>-0.467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811">
                <text:p>-0.481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96">
                <text:p>-0.4896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752">
                <text:p>-0.4752</text:p>
              </table:table-cell>
              <table:table-cell office:value-type="float" office:value="-0.0458">
                <text:p>-0.0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699">
                <text:p>-0.4699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841">
                <text:p>-0.4841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866">
                <text:p>-0.4866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73">
                <text:p>-0.473</text:p>
              </table:table-cell>
              <table:table-cell office:value-type="float" office:value="-0.0318">
                <text:p>-0.0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73">
                <text:p>-0.47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856">
                <text:p>-0.4856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835">
                <text:p>-0.4835</text:p>
              </table:table-cell>
              <table:table-cell office:value-type="float" office:value="-0.0313">
                <text:p>-0.0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72">
                <text:p>-0.472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76">
                <text:p>-0.476</text:p>
              </table:table-cell>
              <table:table-cell office:value-type="float" office:value="0.0323">
                <text:p>0.0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